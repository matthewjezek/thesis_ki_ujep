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ed4e" officeooo:paragraph-rsid="000bed4e"/>
    </style:style>
    <style:style style:name="P2" style:family="paragraph" style:parent-style-name="Standard">
      <style:text-properties officeooo:rsid="000c398e" officeooo:paragraph-rsid="000c398e"/>
    </style:style>
    <style:style style:name="P3" style:family="paragraph" style:parent-style-name="Standard">
      <style:text-properties officeooo:rsid="000e29a3" officeooo:paragraph-rsid="000e29a3"/>
    </style:style>
    <style:style style:name="P4" style:family="paragraph" style:parent-style-name="Standard">
      <style:text-properties officeooo:rsid="000fa309" officeooo:paragraph-rsid="000fa309"/>
    </style:style>
    <style:style style:name="P5" style:family="paragraph" style:parent-style-name="Standard" style:list-style-name="L1">
      <style:text-properties officeooo:rsid="000bed4e" officeooo:paragraph-rsid="000bed4e"/>
    </style:style>
    <style:style style:name="P6" style:family="paragraph" style:parent-style-name="Standard" style:list-style-name="L2">
      <style:text-properties officeooo:rsid="000bed4e" officeooo:paragraph-rsid="000bed4e"/>
    </style:style>
    <style:style style:name="P7" style:family="paragraph" style:parent-style-name="Standard" style:list-style-name="L3">
      <style:text-properties officeooo:rsid="000bed4e" officeooo:paragraph-rsid="000bed4e"/>
    </style:style>
    <style:style style:name="P8" style:family="paragraph" style:parent-style-name="Standard">
      <style:text-properties officeooo:rsid="000bed4e" officeooo:paragraph-rsid="000c398e"/>
    </style:style>
    <style:style style:name="P9" style:family="paragraph" style:parent-style-name="Standard" style:list-style-name="L3">
      <style:text-properties officeooo:rsid="000c398e" officeooo:paragraph-rsid="000c398e"/>
    </style:style>
    <style:style style:name="P10" style:family="paragraph" style:parent-style-name="Standard" style:list-style-name="L4">
      <style:text-properties officeooo:rsid="000c398e" officeooo:paragraph-rsid="000c398e"/>
    </style:style>
    <style:style style:name="P11" style:family="paragraph" style:parent-style-name="Standard" style:list-style-name="L5">
      <style:text-properties officeooo:rsid="000fa309" officeooo:paragraph-rsid="000fa309"/>
    </style:style>
    <style:style style:name="P12" style:family="paragraph" style:parent-style-name="Standard" style:list-style-name="L5">
      <style:text-properties officeooo:rsid="0011e306" officeooo:paragraph-rsid="0011e306"/>
    </style:style>
    <style:style style:name="P13" style:family="paragraph" style:parent-style-name="Standard">
      <style:text-properties fo:font-weight="bold" officeooo:rsid="000bed4e" officeooo:paragraph-rsid="000bed4e" style:font-weight-asian="bold" style:font-weight-complex="bold"/>
    </style:style>
    <style:style style:name="T1" style:family="text">
      <style:text-properties officeooo:rsid="000e29a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ezentace bakalářské práce (Aplikovaná informatika)</text:p>
      <text:p text:style-name="P1"/>
      <text:p text:style-name="P1">průběh:</text:p>
      <text:list text:style-name="L1">
        <text:list-item>
          <text:p text:style-name="P5">prezentace BP studentem (8 minut)</text:p>
        </text:list-item>
        <text:list-item>
          <text:p text:style-name="P5">čtení posudků</text:p>
        </text:list-item>
        <text:list-item>
          <text:p text:style-name="P5">reakce studenta na posudky (je dobré mít připraveno, za koncem prezentace)</text:p>
        </text:list-item>
        <text:list-item>
          <text:p text:style-name="P5">volní diskuse (otázky členů komise)</text:p>
        </text:list-item>
      </text:list>
      <text:p text:style-name="P1"/>
      <text:p text:style-name="P1">co je cílem presentace:</text:p>
      <text:list text:style-name="L2">
        <text:list-item>
          <text:p text:style-name="P6">téma bakalářské práce (motivace, proč je to zajímavé)</text:p>
        </text:list-item>
        <text:list-item>
          <text:p text:style-name="P6">shrnout cíle bakalářské práce</text:p>
        </text:list-item>
        <text:list-item>
          <text:p text:style-name="P6">autorský přínos</text:p>
        </text:list-item>
        <text:list-item>
          <text:p text:style-name="P6">výsledky bakalářské práce (co bylo dosaženo, resp. co se nepovedlo)</text:p>
        </text:list-item>
      </text:list>
      <text:p text:style-name="P1"/>
      <text:p text:style-name="P1">struktura presentace:</text:p>
      <text:list text:style-name="L3">
        <text:list-item>
          <text:p text:style-name="P7">titulní snímek (název, autor, vedoucí práce)</text:p>
        </text:list-item>
        <text:list-item>
          <text:p text:style-name="P7">motivační snímek: základní téma a proč je to zajímavé (vhodná je grafika)¨</text:p>
        </text:list-item>
        <text:list-item>
          <text:p text:style-name="P7">cíle bakalářské práce (musí být v souladu se zadáním)</text:p>
        </text:list-item>
        <text:list-item>
          <text:p text:style-name="P9">teoretický úvod (dva snímky): teoretická východiska, technologický stack</text:p>
        </text:list-item>
        <text:list-item>
          <text:p text:style-name="P9">popis praktické části (tři až čtyři snímky):</text:p>
        </text:list-item>
        <text:list-item>
          <text:p text:style-name="P9">co bylo v rámci práce provedeno (návrh, implementace, testovaní, nasazení(diagramy, grafy screenshoty)</text:p>
        </text:list-item>
        <text:list-item>
          <text:p text:style-name="P9">výsledky (jeden až dva snímky): co bylo vytvořeno resp. dosaženo</text:p>
        </text:list-item>
        <text:list-item>
          <text:p text:style-name="P9">závěr (1 snímek): shrnutí, co bylo provedeno, aby bylo dosaženo cílů, co se nepovedlo, perspektivy</text:p>
        </text:list-item>
      </text:list>
      <text:p text:style-name="P2"/>
      <text:p text:style-name="P2">za presentací by měl následovat ukončovací snímek (děkuji za pozornost, <text:s/>zajímavá grafika)</text:p>
      <text:p text:style-name="P2"/>
      <text:p text:style-name="P2">a za tímto snímkem následují odpovědi na výtky a otázky z posudk<text:span text:style-name="T1">ů (maximálně 1 minuta na odpověď, celkově ne déle než 5 minut)</text:span></text:p>
      <text:list text:style-name="L4">
        <text:list-item>
          <text:p text:style-name="P10">vždy <text:span text:style-name="T1">tam musí být</text:span> odpovědi na explicitní otázky v posudku</text:p>
        </text:list-item>
        <text:list-item>
          <text:p text:style-name="P10">odpovědi na otázky v textu <text:span text:style-name="T1">(pokud jsou zajímavé a relevantní)</text:span></text:p>
        </text:list-item>
        <text:list-item>
          <text:p text:style-name="P10">reakce na výtky <text:span text:style-name="T1">(jen tehdy, pokud student má objektivní a konkrétní argumenty)</text:span></text:p>
        </text:list-item>
      </text:list>
      <text:p text:style-name="P2"/>
      <text:p text:style-name="P3">odpovědi by měly odkazovat na text bakalářské práce resp. na vytvořený kódování</text:p>
      <text:p text:style-name="P3"/>
      <text:p text:style-name="P4">základní pravidla presentace:</text:p>
      <text:list text:style-name="L5">
        <text:list-item>
          <text:p text:style-name="P11">je třeba mít připraven proslov (není to jen čtení snímků, musí mít optimální délku)</text:p>
        </text:list-item>
        <text:list-item>
          <text:p text:style-name="P11">žádné odkazy mezi snímky (neodkazovat na obsah jiných snímků, nesmí tam být obsah)</text:p>
        </text:list-item>
        <text:list-item>
          <text:p text:style-name="P11">ověřit si, že grafika bude čitelná na dataprojektoru (hlavně popisky obrázků)</text:p>
        </text:list-item>
        <text:list-item>
          <text:p text:style-name="P11">praktická prezentace softwaru resp. hardwaru není doporučena (vhodnější je použití videaš , i to se ale může nepovést!)</text:p>
        </text:list-item>
        <text:list-item>
          <text:p text:style-name="P12">vhodná je kontrola pravopisných a typografických chyb jinou osobou</text:p>
        </text:list-item>
      </text:list>
      <text:p text:style-name="P4"/>
      <text:p text:style-name="P4">je nezbytné být připraven na technické problémy:</text:p>
      <text:p text:style-name="P4"><text:tab/>presentace na více úložištích (flash, webové úložiště, e-mail)</text:p>
      <text:p text:style-name="P4"><text:tab/>výtisk presentace na papíru (jeden list) ve třech kopiích</text:p>
      <text:p text:style-name="P4"/>
      <text:p text:style-name="P4"/>
      <text:p text:style-name="P4"/>
      <text:p text:style-name="P2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2:15:58.558321928</meta:creation-date>
    <dc:date>2026-04-16T12:21:11.482599356</dc:date>
    <meta:editing-duration>PT24M1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35" meta:word-count="333" meta:character-count="2121" meta:non-whitespace-character-count="1844"/>
  </office:meta>
</office:document-meta>
</file>